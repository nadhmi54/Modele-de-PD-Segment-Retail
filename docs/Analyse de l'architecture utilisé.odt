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ableColumn14" style:family="table-column">
      <style:table-column-properties style:column-width="1.193in"/>
    </style:style>
    <style:style style:name="TableColumn15" style:family="table-column">
      <style:table-column-properties style:column-width="5.0423in"/>
    </style:style>
    <style:style style:name="Table13" style:family="table">
      <style:table-properties style:width="6.235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3" style:family="paragraph"/>
    <style:style style:name="T4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T5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5" style:family="paragraph"/>
    <style:style style:name="P55" style:parent-style-name="Normal" style:list-style-name="LFO5" style:family="paragraph"/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list-style-name="LFO5" style:family="paragraph"/>
    <style:style style:name="T5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ableColumn62" style:family="table-column">
      <style:table-column-properties style:column-width="0.8555in"/>
    </style:style>
    <style:style style:name="TableColumn63" style:family="table-column">
      <style:table-column-properties style:column-width="5.4444in"/>
    </style:style>
    <style:style style:name="Table61" style:family="table">
      <style:table-properties style:width="6.3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6" style:family="paragraph"/>
    <style:style style:name="P82" style:parent-style-name="Normal" style:list-style-name="LFO6" style:family="paragraph"/>
    <style:style style:name="T8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Normal" style:list-style-name="LFO7" style:family="paragraph"/>
    <style:style style:name="P87" style:parent-style-name="Normal" style:list-style-name="LFO7" style:family="paragraph"/>
    <style:style style:name="T8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list-style-name="LFO8" style:family="paragraph"/>
    <style:style style:name="P91" style:parent-style-name="Normal" style:list-style-name="LFO8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T9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📁</text:span><text:span text:style-name="T3"><text:s/>data/</text:span></text:p>
      <text:p text:style-name="Normal">Contient les fichiers bruts fournis par l'encadrant.<text:s/><text:span text:style-name="T4">On ne modifie jamais ces fichiers</text:span><text:s/>— ils restent comme référence originale.</text:p>
      <text:list text:style-name="LFO1" text:continue-numbering="true">
        <text:list-item>
          <text:p text:style-name="P5">retail_credit.xlsx → la base de données clients avec le flag de défaut</text:p>
        </text:list-item>
        <text:list-item>
          <text:p text:style-name="P6">variable_dictionary.xlsx → le dictionnaire des variables (types, rôles, instructions)</text:p>
        </text:list-item>
      </text:list>
      <text:p text:style-name="Normal"><draw:custom-shape svg:x="0in" svg:y="0in" svg:width="45.51042in" svg:height="0.00139in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📓</text:span><text:span text:style-name="T8"><text:s/>notebooks/</text:span></text:p>
      <text:p text:style-name="Normal">Espace d'exploration et de prototypage interactif.</text:p>
      <text:list text:style-name="LFO2" text:continue-numbering="true">
        <text:list-item>
          <text:p text:style-name="P9">PD_Model.ipynb → le notebook Jupyter où on fait l'EDA, les tests, la visualisation et la validation du modèle. C'est le<text:s/><text:span text:style-name="T10">cahier de travail</text:span>, pas le code de production.</text:p>
        </text:list-item>
      </text:list>
      <text:p text:style-name="Normal"><draw:custom-shape svg:x="0in" svg:y="0in" svg:width="45.51042in" svg:height="0.00139in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⚙️</text:span><text:span text:style-name="T12"><text:s/>src/</text:span></text:p>
      <text:p text:style-name="Normal">Le cœur du projet — le code Python structuré et réutilisable.</text:p>
      <table:table table:style-name="Table13">
        <table:table-columns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Fichier</text:p>
            </table:table-cell>
            <table:table-cell table:style-name="TableCell19">
              <text:p text:style-name="P20"><text:s text:c="7"/>Rôle</text:p>
            </table:table-cell>
          </table:table-row>
        </table:table-header-rows>
        <table:table-row table:style-name="TableRow21">
          <table:table-cell table:style-name="TableCell22">
            <text:p text:style-name="Normal">Eda.py</text:p>
            <text:p text:style-name="Normal"/>
            <text:p text:style-name="Normal">preprocessing.py</text:p>
          </table:table-cell>
          <table:table-cell table:style-name="TableCell23">
            <text:p text:style-name="Normal"><text:s text:c="5"/>Comprendre<text:s/>les données</text:p>
            <text:p text:style-name="Normal"/>
            <text:p text:style-name="Normal"><text:s/>Nettoyage, imputation des valeurs manquantes, encodage, winsorization</text:p>
          </table:table-cell>
        </table:table-row>
        <table:table-row table:style-name="TableRow24">
          <table:table-cell table:style-name="TableCell25">
            <text:p text:style-name="Normal"/>
          </table:table-cell>
          <table:table-cell table:style-name="TableCell26">
            <text:p text:style-name="Normal"/>
          </table:table-cell>
        </table:table-row>
        <table:table-row table:style-name="TableRow27">
          <table:table-cell table:style-name="TableCell28">
            <text:p text:style-name="Normal"/>
          </table:table-cell>
          <table:table-cell table:style-name="TableCell29">
            <text:p text:style-name="Normal"/>
          </table:table-cell>
        </table:table-row>
        <table:table-row table:style-name="TableRow30">
          <table:table-cell table:style-name="TableCell31">
            <text:p text:style-name="Normal">train.py</text:p>
          </table:table-cell>
          <table:table-cell table:style-name="TableCell32">
            <text:p text:style-name="Normal"><text:s text:c="7"/>Entraînement de la régression logistique, sauvegarde du modèle</text:p>
          </table:table-cell>
        </table:table-row>
        <table:table-row table:style-name="TableRow33">
          <table:table-cell table:style-name="TableCell34">
            <text:p text:style-name="Normal">evaluate.py</text:p>
          </table:table-cell>
          <table:table-cell table:style-name="TableCell35">
            <text:p text:style-name="Normal"><text:s text:c="8"/>Calcul des métriques : AUC, Gini, KS, matrice de confusion, calibration</text:p>
          </table:table-cell>
        </table:table-row>
        <table:table-row table:style-name="TableRow36">
          <table:table-cell table:style-name="TableCell37">
            <text:p text:style-name="Normal">predict.py</text:p>
          </table:table-cell>
          <table:table-cell table:style-name="TableCell38">
            <text:p text:style-name="Normal"><text:s text:c="8"/>Chargement du modèle et génération des probabilités de défaut (PD)</text:p>
          </table:table-cell>
        </table:table-row>
        <table:table-row table:style-name="TableRow39">
          <table:table-cell table:style-name="TableCell40">
            <text:p text:style-name="Normal">utils.py</text:p>
          </table:table-cell>
          <table:table-cell table:style-name="TableCell41">
            <text:p text:style-name="Normal"><text:s text:c="9"/>Fonctions utilitaires partagées : logging, chargement de config, helpers</text:p>
          </table:table-cell>
        </table:table-row>
        <table:table-row table:style-name="TableRow42"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</table:table-row>
      </table:table>
      <text:p text:style-name="Normal"><draw:custom-shape svg:x="0in" svg:y="0in" svg:width="45.51042in" svg:height="0.00139in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🧠</text:span><text:span text:style-name="T46"><text:s/>models/</text:span></text:p>
      <text:p text:style-name="Normal">Stocke le modèle entraîné et sérialisé.</text:p>
      <text:list text:style-name="LFO3" text:continue-numbering="true">
        <text:list-item>
          <text:p text:style-name="P47">logistic_regression.pkl → le modèle sauvegardé avec joblib ou pickle, prêt à être chargé pour la prédiction ou le déploiement.</text:p>
        </text:list-item>
      </text:list>
      <text:p text:style-name="Normal"><draw:custom-shape svg:x="0in" svg:y="0in" svg:width="45.51042in" svg:height="0.00139in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">📊</text:span><text:span text:style-name="T49"><text:s/>reports/figures/</text:span></text:p>
      <text:soft-page-break/>
      <text:p text:style-name="Normal">Stocke tous les graphiques générés automatiquement.</text:p>
      <text:list text:style-name="LFO4" text:continue-numbering="true">
        <text:list-item>
          <text:p text:style-name="P50">Courbe ROC, courbe KS, histogramme des PD, calibration par buckets — tout ce qui sera présenté à l'encadrant.</text:p>
        </text:list-item>
      </text:list>
      <text:p text:style-name="Normal"><draw:custom-shape svg:x="0in" svg:y="0in" svg:width="45.51042in" svg:height="0.00139in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📈</text:span><text:span text:style-name="T52"><text:s/>mlruns/</text:span></text:p>
      <text:p text:style-name="Normal">Dossier géré automatiquement par<text:s/><text:span text:style-name="T53">MLflow</text:span>.</text:p>
      <text:list text:style-name="LFO5" text:continue-numbering="true">
        <text:list-item>
          <text:p text:style-name="P54">Trace chaque expérience : paramètres utilisés, métriques obtenues, version du modèle</text:p>
        </text:list-item>
        <text:list-item>
          <text:p text:style-name="P55">Permet de<text:s/><text:span text:style-name="T56">comparer plusieurs runs</text:span><text:s/>et de retrouver le meilleur modèle</text:p>
        </text:list-item>
        <text:list-item>
          <text:p text:style-name="P57">Accessible via une interface web : mlflow ui</text:p>
        </text:list-item>
      </text:list>
      <text:p text:style-name="Normal"><draw:custom-shape svg:x="0in" svg:y="0in" svg:width="45.51042in" svg:height="0.00139in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8">🌐</text:span><text:span text:style-name="T59"><text:s/>api/</text:span></text:p>
      <text:p text:style-name="Normal">Expose le modèle comme un<text:s/><text:span text:style-name="T60">service web</text:span><text:s/>via FastAPI.</text:p>
      <table:table table:style-name="Table61">
        <table:table-columns>
          <table:table-column table:style-name="TableColumn62"/>
          <table:table-column table:style-name="TableColumn63"/>
        </table:table-columns>
        <table:table-header-rows>
          <table:table-row table:style-name="TableRow64">
            <table:table-cell table:style-name="TableCell65">
              <text:p text:style-name="P66">Fichier</text:p>
            </table:table-cell>
            <table:table-cell table:style-name="TableCell67">
              <text:p text:style-name="P68"><text:s text:c="5"/>Rôle</text:p>
            </table:table-cell>
          </table:table-row>
        </table:table-header-rows>
        <table:table-row table:style-name="TableRow69">
          <table:table-cell table:style-name="TableCell70">
            <text:p text:style-name="Normal">app.py</text:p>
          </table:table-cell>
          <table:table-cell table:style-name="TableCell71">
            <text:p text:style-name="Normal"><text:s text:c="4"/>Définit les endpoints REST (ex: POST /predict → retourne la PD d'un client)</text:p>
          </table:table-cell>
        </table:table-row>
        <table:table-row table:style-name="TableRow72">
          <table:table-cell table:style-name="TableCell73">
            <text:p text:style-name="Normal">schemas.py</text:p>
          </table:table-cell>
          <table:table-cell table:style-name="TableCell74">
            <text:p text:style-name="Normal"><text:s text:c="4"/>Définit la structure des données en entrée/sortie avec Pydantic (validation <text:s text:c="10"/>automatique)</text:p>
          </table:table-cell>
        </table:table-row>
        <table:table-row table:style-name="TableRow75">
          <table:table-cell table:style-name="TableCell76">
            <text:p text:style-name="Normal"/>
          </table:table-cell>
          <table:table-cell table:style-name="TableCell77">
            <text:p text:style-name="Normal"/>
          </table:table-cell>
        </table:table-row>
      </table:table>
      <text:p text:style-name="Normal"><draw:custom-shape svg:x="0in" svg:y="0in" svg:width="45.51042in" svg:height="0.00139in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🐳</text:span><text:span text:style-name="T79"><text:s/>Dockerfile</text:span></text:p>
      <text:p text:style-name="Normal">Permet de<text:s/><text:span text:style-name="T80">containeriser</text:span><text:s/>toute l'application dans une image Docker.</text:p>
      <text:list text:style-name="LFO6" text:continue-numbering="true">
        <text:list-item>
          <text:p text:style-name="P81">Garantit que le projet tourne de la même façon sur n'importe quelle machine</text:p>
        </text:list-item>
        <text:list-item>
          <text:p text:style-name="P82">Facilite le déploiement sur un serveur ou un cloud</text:p>
        </text:list-item>
      </text:list>
      <text:p text:style-name="Normal"><draw:custom-shape svg:x="0in" svg:y="0in" svg:width="45.51042in" svg:height="0.00139in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3">📋</text:span><text:span text:style-name="T84"><text:s/>requirements.txt</text:span></text:p>
      <text:p text:style-name="Normal">Liste toutes les<text:s/><text:span text:style-name="T85">dépendances Python</text:span><text:s/>du projet avec leurs versions.</text:p>
      <text:list text:style-name="LFO7" text:continue-numbering="true">
        <text:list-item>
          <text:p text:style-name="P86">Exemple : scikit-learn==1.4.0, pandas==2.1.0, fastapi==0.110.0</text:p>
        </text:list-item>
        <text:list-item>
          <text:p text:style-name="P87">Permet à n'importe qui de recréer l'environnement avec pip install -r requirements.txt</text:p>
        </text:list-item>
      </text:list>
      <text:p text:style-name="Normal"><draw:custom-shape svg:x="0in" svg:y="0in" svg:width="45.51042in" svg:height="0.00139in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8">⚙️</text:span><text:span text:style-name="T89"><text:s/>config.yaml</text:span></text:p>
      <text:p text:style-name="Normal">Fichier de configuration centralisé.</text:p>
      <text:list text:style-name="LFO8" text:continue-numbering="true">
        <text:list-item>
          <text:p text:style-name="P90">Chemins des fichiers, hyperparamètres du modèle, seuils de capping</text:p>
        </text:list-item>
        <text:list-item>
          <text:p text:style-name="P91">Évite les<text:s/><text:span text:style-name="T92">valeurs hardcodées</text:span><text:s/>dans le code — tout se modifie depuis un seul endroit</text:p>
        </text:list-item>
      </text:list>
      <text:p text:style-name="Normal"><draw:custom-shape svg:x="0in" svg:y="0in" svg:width="45.51042in" svg:height="0.00139in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3">📖</text:span><text:span text:style-name="T94"><text:s/>README.md</text:span></text:p>
      <text:p text:style-name="Normal">La<text:s/><text:span text:style-name="T95">documentation principale</text:span><text:s/>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dhmi ROUISSI</meta:initial-creator>
    <dc:creator>Nadhmi ROUISSI</dc:creator>
    <meta:creation-date>2026-06-18T14:39:00Z</meta:creation-date>
    <dc:date>2026-06-18T14:56:00Z</dc:date>
    <meta:template xlink:href="Normal.dotm" xlink:type="simple"/>
    <meta:editing-cycles>2</meta:editing-cycles>
    <meta:editing-duration>PT660S</meta:editing-duration>
    <meta:document-statistic meta:page-count="3" meta:paragraph-count="5" meta:word-count="418" meta:character-count="2712" meta:row-count="19" meta:non-whitespace-character-count="2299"/>
  </office:meta>
</office:document-meta>
</file>